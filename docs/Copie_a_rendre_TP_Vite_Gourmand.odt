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E0000004E2CF5DB4B4598BFF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1" style:family="table">
      <style:table-properties style:width="16.249cm" fo:margin-left="-0.191cm" table:align="left" style:writing-mode="lr-tb"/>
    </style:style>
    <style:style style:name="Table1.A" style:family="table-column">
      <style:table-column-properties style:column-width="5.191cm"/>
    </style:style>
    <style:style style:name="Table1.B" style:family="table-column">
      <style:table-column-properties style:column-width="11.058cm"/>
    </style:style>
    <style:style style:name="Table1.1" style:family="table-row">
      <style:table-row-properties fo:keep-together="auto"/>
    </style:style>
    <style:style style:name="Table1.A1" style:family="table-cell">
      <style:table-cell-properties style:vertical-align="top" fo:background-color="#7635ff" fo:padding-left="0.191cm" fo:padding-right="0.191cm" fo:padding-top="0cm" fo:padding-bottom="0cm" fo:border="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style:font-name="Calibri" fo:font-size="11pt" style:font-size-asian="11pt" style:font-name-complex="Calibri" style:font-size-complex="11pt"/>
    </style:style>
    <style:style style:name="P2" style:family="paragraph" style:parent-style-name="Header">
      <style:text-properties fo:color="#000000" loext:opacity="100%" style:font-name="Calibri" style:font-name-complex="Calibri"/>
    </style:style>
    <style:style style:name="P3" style:family="paragraph" style:parent-style-name="Heading_20_2">
      <style:paragraph-properties fo:margin-top="0cm" fo:margin-bottom="0.499cm" style:contextual-spacing="false"/>
    </style:style>
    <style:style style:name="P4" style:family="paragraph" style:parent-style-name="Heading_20_2">
      <style:paragraph-properties fo:text-align="justify" style:justify-single-word="false"/>
      <style:text-properties style:font-name="Calibri" fo:font-size="12pt" style:font-size-asian="12pt" style:font-name-complex="Calibri" style:font-size-complex="12pt"/>
    </style:style>
    <style:style style:name="P5" style:family="paragraph" style:parent-style-name="Heading_20_2">
      <style:paragraph-properties fo:text-align="justify" style:justify-single-word="false"/>
      <style:text-properties style:font-name="Calibri"/>
    </style:style>
    <style:style style:name="P6" style:family="paragraph" style:parent-style-name="Heading_20_3">
      <style:paragraph-properties fo:margin-top="0.071cm" fo:margin-bottom="0.499cm" style:contextual-spacing="false"/>
    </style:style>
    <style:style style:name="P7" style:family="paragraph" style:parent-style-name="Heading_20_3">
      <style:paragraph-properties fo:margin-top="0cm" fo:margin-bottom="0cm" style:contextual-spacing="true"/>
      <style:text-properties style:font-name="Calibri" fo:font-size="11pt" fo:font-weight="bold" style:font-size-asian="11pt" style:font-weight-asian="bold" style:font-name-complex="Calibri" style:font-size-complex="11pt"/>
    </style:style>
    <style:style style:name="P8" style:family="paragraph" style:parent-style-name="Heading_20_3">
      <style:paragraph-properties fo:margin-top="0cm" fo:margin-bottom="0.353cm" style:contextual-spacing="true" fo:line-height="115%" fo:text-align="start" style:justify-single-word="false"/>
    </style:style>
    <style:style style:name="P9" style:family="paragraph" style:parent-style-name="Heading_20_3">
      <style:paragraph-properties fo:margin-top="0cm" fo:margin-bottom="0.353cm" style:contextual-spacing="true" fo:line-height="115%" fo:text-align="start" style:justify-single-word="false"/>
      <style:text-properties officeooo:paragraph-rsid="000a0bcd"/>
    </style:style>
    <style:style style:name="P10" style:family="paragraph" style:parent-style-name="Paragraphe_20_de_20_liste" style:list-style-name="WW8Num4">
      <style:paragraph-properties fo:margin-top="0cm" fo:margin-bottom="0.353cm" style:contextual-spacing="true" fo:line-height="115%" fo:text-align="start" style:justify-single-word="false"/>
    </style:style>
    <style:style style:name="P11" style:family="paragraph" style:parent-style-name="Paragraphe_20_de_20_liste" style:list-style-name="WW8Num3">
      <style:paragraph-properties fo:margin-top="0cm" fo:margin-bottom="0.353cm" style:contextual-spacing="true" fo:line-height="115%" fo:text-align="start" style:justify-single-word="false"/>
    </style:style>
    <style:style style:name="P12" style:family="paragraph" style:parent-style-name="Paragraphe_20_de_20_liste">
      <style:paragraph-properties fo:margin-top="0cm" fo:margin-bottom="0.353cm" style:contextual-spacing="true" fo:line-height="115%" fo:text-align="start" style:justify-single-word="false"/>
    </style:style>
    <style:style style:name="P13" style:family="paragraph" style:parent-style-name="Paragraphe_20_de_20_liste" style:list-style-name="WW8Num2">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4" style:family="paragraph" style:parent-style-name="Paragraphe_20_de_20_liste" style:list-style-name="WW8Num2">
      <style:paragraph-properties fo:margin-top="0cm" fo:margin-bottom="0.353cm" style:contextual-spacing="true" fo:line-height="115%" fo:text-align="start" style:justify-single-word="false"/>
      <style:text-properties style:font-name="Calibri" fo:font-size="12pt" fo:font-weight="bold" officeooo:paragraph-rsid="000a0bcd" style:font-size-asian="12pt" style:font-weight-asian="bold" style:font-name-complex="Calibri" style:font-size-complex="12pt"/>
    </style:style>
    <style:style style:name="P15" style:family="paragraph" style:parent-style-name="Paragraphe_20_de_20_liste">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6" style:family="paragraph" style:parent-style-name="Paragraphe_20_de_20_liste" style:list-style-name="WW8Num3">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7" style:family="paragraph" style:parent-style-name="Paragraphe_20_de_20_liste">
      <style:text-properties style:font-name="Calibri" fo:font-size="12pt" fo:font-weight="bold" style:font-size-asian="12pt" style:font-weight-asian="bold" style:font-name-complex="Calibri" style:font-size-complex="12pt"/>
    </style:style>
    <style:style style:name="P18" style:family="paragraph" style:parent-style-name="Standard">
      <style:text-properties style:font-name="Calibri" fo:font-size="11pt" style:font-size-asian="11pt" style:font-name-complex="Calibri" style:font-size-complex="11pt"/>
    </style:style>
    <style:style style:name="P19" style:family="paragraph" style:parent-style-name="Standard">
      <style:paragraph-properties fo:margin-left="0.635cm" fo:margin-right="0cm" fo:text-indent="0cm" style:auto-text-indent="false"/>
      <style:text-properties style:font-name="Calibri" fo:font-size="11pt" style:font-size-asian="11pt" style:font-name-complex="Calibri" style:font-size-complex="11pt"/>
    </style:style>
    <style:style style:name="P20" style:family="paragraph" style:parent-style-name="Standard">
      <style:paragraph-properties fo:margin-top="0cm" fo:margin-bottom="0cm" style:contextual-spacing="true"/>
      <style:text-properties style:font-name="Calibri" fo:font-size="11pt" fo:font-weight="bold" style:font-size-asian="11pt" style:font-weight-asian="bold" style:font-name-complex="Calibri" style:font-size-complex="11pt"/>
    </style:style>
    <style:style style:name="P21" style:family="paragraph" style:parent-style-name="Standard">
      <style:text-properties style:font-name="Calibri" fo:font-size="11pt" fo:font-weight="bold" style:font-name-asian="Times New Roman" style:font-size-asian="11pt" style:font-weight-asian="bold" style:font-name-complex="Calibri" style:font-size-complex="11pt"/>
    </style:style>
    <style:style style:name="P22"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23"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style>
    <style:style style:name="P24" style:family="paragraph" style:parent-style-name="Standard">
      <style:paragraph-properties fo:text-align="start" style:justify-single-word="false"/>
      <style:text-properties style:font-name="Calibri" fo:font-size="16pt" fo:font-weight="bold" style:font-size-asian="16pt" style:font-weight-asian="bold" style:font-name-complex="Calibri" style:font-size-complex="16pt" style:font-weight-complex="bold"/>
    </style:style>
    <style:style style:name="P25" style:family="paragraph" style:parent-style-name="Standard">
      <style:paragraph-properties fo:text-align="center" style:justify-single-word="false"/>
      <style:text-properties style:font-name="Calibri" fo:font-size="16pt" fo:font-weight="bold" style:font-size-asian="16pt" style:font-weight-asian="bold" style:font-name-complex="Calibri" style:font-size-complex="16pt" style:font-weight-complex="bold"/>
    </style:style>
    <style:style style:name="P26" style:family="paragraph" style:parent-style-name="Standard">
      <style:text-properties style:font-name="Calibri" fo:font-weight="bold" style:font-weight-asian="bold" style:font-name-complex="Calibri" style:font-weight-complex="bold"/>
    </style:style>
    <style:style style:name="P27" style:family="paragraph" style:parent-style-name="Standard">
      <style:text-properties style:font-name="Calibri" fo:font-size="12pt" fo:font-weight="bold" style:font-size-asian="12pt" style:font-weight-asian="bold" style:font-name-complex="Calibri" style:font-size-complex="12pt"/>
    </style:style>
    <style:style style:name="P28" style:family="paragraph" style:parent-style-name="Standard" style:list-style-name="WW8Num1">
      <style:text-properties style:font-name="Calibri" fo:font-size="12pt" fo:font-weight="bold" style:font-size-asian="12pt" style:font-weight-asian="bold" style:font-name-complex="Calibri" style:font-size-complex="11pt" style:font-weight-complex="bold"/>
    </style:style>
    <style:style style:name="P29" style:family="paragraph" style:parent-style-name="Standard">
      <style:text-properties style:font-name="Calibri" fo:font-size="12pt" fo:font-weight="bold" style:font-size-asian="12pt" style:font-weight-asian="bold" style:font-name-complex="Calibri" style:font-size-complex="11pt" style:font-weight-complex="bold"/>
    </style:style>
    <style:style style:name="P30" style:family="paragraph" style:parent-style-name="Standard">
      <style:text-properties fo:color="#ffffff" loext:opacity="100%" style:font-name="Calibri" fo:font-size="11pt" fo:font-weight="bold" style:font-size-asian="11pt" style:font-weight-asian="bold" style:font-name-complex="Calibri" style:font-size-complex="11pt"/>
    </style:style>
    <style:style style:name="P31" style:family="paragraph" style:parent-style-name="Standard">
      <style:paragraph-properties fo:line-height="115%" fo:text-align="center" style:justify-single-word="false"/>
      <style:text-properties fo:color="#ffffff" loext:opacity="100%" style:font-name="Calibri" fo:font-size="20pt" fo:font-weight="bold" style:font-size-asian="20pt" style:font-weight-asian="bold" style:font-name-complex="Calibri"/>
    </style:style>
    <style:style style:name="P32" style:family="paragraph" style:parent-style-name="Standard">
      <style:paragraph-properties fo:line-height="115%" fo:text-align="center" style:justify-single-word="false"/>
      <style:text-properties fo:color="#ffffff" loext:opacity="100%" style:font-name="Calibri" fo:font-size="14pt" fo:font-weight="bold" style:font-size-asian="14pt" style:font-weight-asian="bold" style:font-name-complex="Calibri"/>
    </style:style>
    <style:style style:name="P33" style:family="paragraph" style:parent-style-name="Standard">
      <style:paragraph-properties fo:text-align="center" style:justify-single-word="false"/>
      <style:text-properties fo:color="#ffffff" loext:opacity="100%" style:font-name="Calibri" fo:font-size="22pt" fo:font-weight="bold" style:font-size-asian="22pt" style:font-weight-asian="bold" style:font-name-complex="Calibri" style:font-size-complex="22pt"/>
    </style:style>
    <style:style style:name="P34" style:family="paragraph" style:parent-style-name="Standard">
      <style:text-properties fo:color="#ffffff" loext:opacity="100%" style:font-name="Calibri" fo:font-size="16pt" fo:font-weight="bold" style:font-size-asian="16pt" style:font-weight-asian="bold" style:font-name-complex="Calibri" style:font-size-complex="16pt"/>
    </style:style>
    <style:style style:name="P35" style:family="paragraph" style:parent-style-name="Standard">
      <style:paragraph-properties fo:text-align="start" style:justify-single-word="false"/>
      <style:text-properties fo:color="#ffffff" loext:opacity="100%" style:font-name="Calibri" fo:font-size="16pt" fo:font-weight="bold" style:font-size-asian="16pt" style:font-weight-asian="bold" style:font-name-complex="Calibri" style:font-size-complex="16pt" style:font-weight-complex="bold"/>
    </style:style>
    <style:style style:name="P36" style:family="paragraph" style:parent-style-name="Standard">
      <style:text-properties fo:color="#ffffff" loext:opacity="100%"/>
    </style:style>
    <style:style style:name="P37" style:family="paragraph" style:parent-style-name="Standard">
      <style:paragraph-properties style:snap-to-layout-grid="false"/>
      <style:text-properties fo:color="#0070c0" loext:opacity="100%" style:font-name="Calibri" fo:font-size="11pt" fo:font-weight="bold" officeooo:rsid="000a0bcd" style:font-size-asian="11pt" style:font-weight-asian="bold" style:font-name-complex="Calibri" style:font-size-complex="11pt"/>
    </style:style>
    <style:style style:name="P38" style:family="paragraph" style:parent-style-name="Standard">
      <style:paragraph-properties style:snap-to-layout-grid="false"/>
      <style:text-properties fo:color="#0070c0" loext:opacity="100%" style:font-name="Calibri" fo:font-size="11pt" fo:font-weight="bold" officeooo:rsid="000a0bcd" officeooo:paragraph-rsid="000a0bcd" style:font-size-asian="11pt" style:font-weight-asian="bold" style:font-name-complex="Calibri" style:font-size-complex="11pt"/>
    </style:style>
    <style:style style:name="P39" style:family="paragraph" style:parent-style-name="Standard">
      <style:paragraph-properties fo:margin-top="0cm" fo:margin-bottom="0.353cm" style:contextual-spacing="true" fo:line-height="115%" fo:text-align="start"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line-height="115%" fo:text-align="center" style:justify-single-word="false"/>
      <style:text-properties fo:color="#173d6d" loext:opacity="100%" style:font-name="Calibri" fo:font-size="16pt" fo:font-weight="bold" style:font-size-asian="16pt" style:font-weight-asian="bold" style:font-name-complex="Calibri" style:font-size-complex="22pt"/>
    </style:style>
    <style:style style:name="P42" style:family="paragraph" style:parent-style-name="Standard">
      <style:paragraph-properties>
        <style:tab-stops>
          <style:tab-stop style:position="11.98cm"/>
        </style:tab-stops>
      </style:paragraph-properties>
      <style:text-properties fo:color="#173d6d" loext:opacity="100%" style:font-name="Calibri" fo:font-size="16pt" fo:font-weight="bold" style:font-size-asian="16pt" style:font-weight-asian="bold" style:font-name-complex="Calibri" style:font-size-complex="20pt" style:font-weight-complex="bold"/>
    </style:style>
    <style:style style:name="P43" style:family="paragraph" style:parent-style-name="Standard">
      <style:text-properties fo:color="#173d6d" loext:opacity="100%" style:font-name="Calibri" fo:font-size="16pt" fo:font-weight="bold" style:font-size-asian="16pt" style:font-weight-asian="bold" style:font-name-complex="Calibri" style:font-size-complex="20pt" style:font-weight-complex="bold"/>
    </style:style>
    <style:style style:name="P44" style:family="paragraph" style:parent-style-name="Standard">
      <style:text-properties fo:color="#173d6d" loext:opacity="100%" style:font-name="Calibri" fo:font-size="16pt" fo:font-weight="bold" style:font-size-asian="16pt" style:font-weight-asian="bold" style:font-name-complex="Calibri" style:font-size-complex="16pt" style:font-weight-complex="bold"/>
    </style:style>
    <style:style style:name="P45" style:family="paragraph" style:parent-style-name="Standard">
      <style:text-properties fo:color="#173d6d" loext:opacity="100%" style:font-name="Calibri" fo:font-size="11pt" fo:font-weight="bold" style:font-size-asian="11pt" style:font-weight-asian="bold" style:font-name-complex="Calibri" style:font-size-complex="11pt"/>
    </style:style>
    <style:style style:name="P46" style:family="paragraph" style:parent-style-name="Standard">
      <style:text-properties fo:color="#173d6d" loext:opacity="100%" style:font-name="Calibri" fo:font-size="11pt" style:font-size-asian="11pt" style:font-name-complex="Calibri" style:font-size-complex="11pt"/>
    </style:style>
    <style:style style:name="P47" style:family="paragraph" style:parent-style-name="Standard">
      <style:text-properties fo:color="#ee704c" loext:opacity="100%" style:font-name="Calibri" fo:font-size="11pt" style:font-size-asian="11pt" style:font-name-complex="Calibri" style:font-size-complex="11pt"/>
    </style:style>
    <style:style style:name="P48" style:family="paragraph" style:parent-style-name="Standard">
      <style:paragraph-properties fo:text-align="center" style:justify-single-word="false"/>
      <style:text-properties fo:font-size="14pt" style:font-size-asian="14pt" style:font-size-complex="14pt"/>
    </style:style>
    <style:style style:name="P49" style:family="paragraph" style:parent-style-name="Standard">
      <style:text-properties fo:color="#595959" loext:opacity="100%" style:font-name="Calibri" fo:font-size="11pt" style:font-size-asian="11pt" style:font-name-complex="Calibri" style:font-size-complex="11pt"/>
    </style:style>
    <style:style style:name="P50" style:family="paragraph" style:parent-style-name="Standard">
      <style:text-properties fo:color="#4f81bd" loext:opacity="100%" style:font-name="Calibri" style:font-name-complex="Arial"/>
    </style:style>
    <style:style style:name="P51" style:family="paragraph" style:parent-style-name="Standard">
      <style:text-properties fo:color="#4f81bd" loext:opacity="100%" style:font-name="Calibri" fo:font-size="12pt" fo:font-weight="bold" style:font-size-asian="12pt" style:font-weight-asian="bold" style:font-name-complex="Arial" style:font-size-complex="12pt"/>
    </style:style>
    <style:style style:name="P52" style:family="paragraph" style:parent-style-name="Standard">
      <style:paragraph-properties fo:break-before="page"/>
      <style:text-properties fo:color="#4f81bd" loext:opacity="100%" fo:language="none" fo:country="none" style:language-asian="none" style:country-asian="none" style:font-name-complex="Arial"/>
    </style:style>
    <style:style style:name="P53" style:family="paragraph" style:parent-style-name="Standard">
      <style:paragraph-properties fo:text-align="center" style:justify-single-word="false"/>
      <style:text-properties fo:color="#ff0000" loext:opacity="100%" style:font-name="Calibri" fo:font-size="22pt" fo:font-weight="bold" style:font-size-asian="22pt" style:font-weight-asian="bold" style:font-name-complex="Calibri" style:font-size-complex="22pt" style:font-weight-complex="bold"/>
    </style:style>
    <style:style style:name="P54" style:family="paragraph" style:parent-style-name="Standard">
      <style:paragraph-properties fo:text-align="center" style:justify-single-word="false"/>
      <style:text-properties fo:color="#ff0000" loext:opacity="100%" style:font-name="Calibri" fo:font-size="20pt" fo:language="none" fo:country="none" fo:font-weight="bold" style:font-size-asian="20pt" style:language-asian="none" style:country-asian="none" style:font-weight-asian="bold" style:font-name-complex="Calibri" style:font-size-complex="20pt" style:font-weight-complex="bold"/>
    </style:style>
    <style:style style:name="P55" style:family="paragraph" style:parent-style-name="Standard">
      <style:text-properties fo:color="#002060" loext:opacity="100%" style:font-name="Calibri" fo:font-size="16pt" fo:font-weight="bold" style:font-size-asian="16pt" style:font-weight-asian="bold" style:font-name-complex="Calibri" style:font-size-complex="20pt" style:font-weight-complex="bold"/>
    </style:style>
    <style:style style:name="P56" style:family="paragraph" style:parent-style-name="Standard">
      <style:paragraph-properties style:text-autospace="none"/>
    </style:style>
    <style:style style:name="P57" style:family="paragraph" style:parent-style-name="Standard">
      <style:paragraph-properties fo:text-align="start" style:justify-single-word="false"/>
    </style:style>
    <style:style style:name="P58" style:family="paragraph" style:parent-style-name="Standard">
      <style:paragraph-properties fo:text-align="justify" style:justify-single-word="false"/>
    </style:style>
    <style:style style:name="P59" style:family="paragraph" style:parent-style-name="Text_20_body">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60" style:family="paragraph" style:parent-style-name="Text_20_body">
      <style:text-properties style:font-name="Calibri" fo:font-size="12pt" fo:font-weight="bold" style:font-size-asian="12pt" style:font-weight-asian="bold" style:font-name-complex="Calibri" style:font-size-complex="11pt" style:font-weight-complex="bold"/>
    </style:style>
    <style:style style:name="P61" style:family="paragraph" style:parent-style-name="Text_20_body" style:list-style-name="L12">
      <style:text-properties style:font-name="Calibri" fo:font-size="12pt" fo:font-weight="normal" officeooo:paragraph-rsid="000adf1f" style:font-size-asian="12pt" style:font-weight-asian="normal" style:font-name-complex="Calibri" style:font-size-complex="11pt" style:font-weight-complex="normal"/>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paragraph-properties fo:margin-top="0cm" fo:margin-bottom="0.353cm" style:contextual-spacing="true" fo:line-height="115%" fo:text-align="start" style:justify-single-word="false"/>
    </style:style>
    <style:style style:name="P69" style:family="paragraph" style:parent-style-name="Text_20_body">
      <style:paragraph-properties fo:margin-top="0cm" fo:margin-bottom="0.353cm" style:contextual-spacing="true" fo:line-height="115%" fo:text-align="start" style:justify-single-word="false"/>
      <style:text-properties officeooo:paragraph-rsid="000a0bcd"/>
    </style:style>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text-properties fo:color="#4f81bd" loext:opacity="100%" style:font-name="Calibri" fo:font-size="12pt" fo:font-weight="bold" style:font-size-asian="12pt" style:font-weight-asian="bold" style:font-name-complex="Arial" style:font-size-complex="12pt"/>
    </style:style>
    <style:style style:name="P77" style:family="paragraph" style:parent-style-name="titre2_5f_comnicia">
      <style:text-properties fo:color="#ee704c" loext:opacity="100%" style:font-name="Calibri" fo:font-size="22pt" style:font-size-asian="22pt" style:font-name-complex="Calibri" style:font-size-complex="20pt"/>
    </style:style>
    <style:style style:name="P78" style:family="paragraph" style:parent-style-name="titre2_5f_comnicia">
      <style:text-properties fo:color="#173d6d" loext:opacity="100%" style:font-name="Calibri" fo:font-size="14pt" style:font-size-asian="14pt" style:font-name-complex="Calibri" style:font-size-complex="20pt"/>
    </style:style>
    <style:style style:name="P79" style:family="paragraph">
      <loext:graphic-properties draw:fill="solid" draw:fill-color="#7635ff"/>
      <style:paragraph-properties style:writing-mode="lr-tb"/>
    </style:style>
    <style:style style:name="T1" style:family="text">
      <style:text-properties style:font-name="Calibri" fo:font-size="11pt" fo:font-weight="bold" style:font-name-asian="Times New Roman" style:font-size-asian="11pt" style:font-weight-asian="bold" style:font-name-complex="Calibri" style:font-size-complex="11pt"/>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fo:font-size="12pt" fo:font-weight="bold" style:font-size-asian="12pt" style:font-weight-asian="bold" style:font-name-complex="Calibri" style:font-size-complex="12pt"/>
    </style:style>
    <style:style style:name="T5" style:family="text">
      <style:text-properties style:font-name="Calibri" fo:font-size="12pt" style:font-size-asian="12pt" style:font-name-complex="Calibri" style:font-size-complex="12pt"/>
    </style:style>
    <style:style style:name="T6" style:family="text">
      <style:text-properties style:font-name-complex="Calibri"/>
    </style:style>
    <style:style style:name="T7" style:family="text">
      <style:text-properties style:font-size-complex="11pt"/>
    </style:style>
    <style:style style:name="T8" style:family="text">
      <style:text-properties fo:color="#ffffff" loext:opacity="100%"/>
    </style:style>
    <style:style style:name="T9" style:family="text">
      <style:text-properties fo:color="#ffffff" loext:opacity="100%" style:font-name="Calibri" fo:font-size="20pt" fo:font-weight="bold" style:font-size-asian="20pt" style:font-weight-asian="bold" style:font-name-complex="Calibri"/>
    </style:style>
    <style:style style:name="T10" style:family="text">
      <style:text-properties fo:color="#ffffff" loext:opacity="100%" style:font-name="Calibri" fo:font-size="22pt" style:font-size-asian="22pt" style:font-name-complex="Calibri" style:font-size-complex="22pt"/>
    </style:style>
    <style:style style:name="T11" style:family="text">
      <style:text-properties fo:color="#ffffff" loext:opacity="100%" style:font-name="Calibri" fo:font-size="16pt" fo:font-weight="bold" style:font-size-asian="16pt" style:font-weight-asian="bold" style:font-name-complex="Calibri" style:font-size-complex="20pt"/>
    </style:style>
    <style:style style:name="T12" style:family="text">
      <style:text-properties fo:color="#ffffff" loext:opacity="100%" style:font-name="Calibri" fo:font-size="16pt" fo:font-weight="bold" style:font-size-asian="16pt" style:font-weight-asian="bold" style:font-name-complex="Calibri" style:font-size-complex="20pt" style:font-weight-complex="bold"/>
    </style:style>
    <style:style style:name="T13" style:family="text">
      <style:text-properties fo:color="#ffffff" loext:opacity="100%" style:font-name="Calibri" fo:font-size="16pt" fo:font-weight="bold" style:font-size-asian="16pt" style:font-weight-asian="bold" style:font-name-complex="Calibri" style:font-size-complex="16pt"/>
    </style:style>
    <style:style style:name="T14" style:family="text">
      <style:text-properties fo:color="#ffffff" loext:opacity="100%" style:font-name="Calibri" fo:font-size="16pt" fo:font-weight="bold" style:font-size-asian="16pt" style:font-weight-asian="bold" style:font-name-complex="Calibri" style:font-size-complex="16pt" style:font-weight-complex="bold"/>
    </style:style>
    <style:style style:name="T15" style:family="text">
      <style:text-properties fo:color="#ffffff" loext:opacity="100%" style:font-name="Cabrito Sans Cond Book" fo:language="none" fo:country="none" style:language-asian="none" style:country-asian="none" style:font-name-complex="Cabrito Sans Cond Book"/>
    </style:style>
    <style:style style:name="T16" style:family="text">
      <style:text-properties fo:color="#4f81bd" loext:opacity="100%"/>
    </style:style>
    <style:style style:name="T17" style:family="text">
      <style:text-properties fo:color="#002060" loext:opacity="100%" style:font-name="Calibri" fo:font-size="16pt" fo:font-weight="bold" style:font-size-asian="16pt" style:font-weight-asian="bold" style:font-name-complex="Calibri" style:font-size-complex="20pt"/>
    </style:style>
    <style:style style:name="T18" style:family="text">
      <style:text-properties fo:color="#173d6d" loext:opacity="100%" style:font-name="Calibri" fo:font-size="16pt" fo:font-weight="bold" style:font-size-asian="16pt" style:font-weight-asian="bold" style:font-name-complex="Calibri" style:font-size-complex="20pt" style:font-weight-complex="bold"/>
    </style:style>
    <style:style style:name="T19" style:family="text">
      <style:text-properties fo:color="#173d6d" loext:opacity="100%" style:font-name="Calibri" fo:font-size="16pt" fo:font-weight="bold" style:font-size-asian="16pt" style:font-weight-asian="bold" style:font-name-complex="Calibri" style:font-size-complex="16pt" style:font-weight-complex="bold"/>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content" fo:background-color="#7635ff" draw:fill="solid" draw:fill-color="#7635ff" fo:padding-left="0.256cm" fo:padding-right="0.256cm" fo:padding-top="0.129cm" fo:padding-bottom="0.129cm" fo:border="none"/>
    </style:style>
    <style:style style:name="fr2"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 fo:background-color="#7635ff" draw:fill="solid" draw:fill-color="#7635ff" fo:padding-left="0.256cm" fo:padding-right="0.256cm" fo:padding-top="0.129cm" fo:padding-bottom="0.129cm" fo:border="none"/>
    </style:style>
    <style:style style:name="fr3"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draw:fill="solid" draw:fill-color="#7635ff" draw:textarea-horizontal-align="left" draw:textarea-vertical-align="top" draw:auto-grow-height="false" fo:min-height="1.143cm" fo:min-width="17.572cm"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ge-content"/>
    </style:style>
    <style:style style:name="gr2" style:family="graphic">
      <style:graphic-properties draw:stroke="none" draw:fill="solid" draw:fill-color="#7635ff" draw:textarea-horizontal-align="left" draw:textarea-vertical-align="top" draw:auto-grow-height="false" fo:min-height="3.069cm" fo:min-width="20.309cm"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le1" table:style-name="Table1">
        <table:table-column table:style-name="Table1.A"/>
        <table:table-column table:style-name="Table1.B"/>
        <table:table-row table:style-name="Table1.1">
          <table:table-cell table:style-name="Table1.A1" office:value-type="string">
            <text:p text:style-name="P30">NOM</text:p>
          </table:table-cell>
          <table:table-cell table:style-name="Table1.B1" office:value-type="string">
            <text:p text:style-name="P38">DUFFOUR</text:p>
          </table:table-cell>
        </table:table-row>
        <table:table-row table:style-name="Table1.1">
          <table:table-cell table:style-name="Table1.A1" office:value-type="string">
            <text:p text:style-name="P30">Prénom</text:p>
          </table:table-cell>
          <table:table-cell table:style-name="Table1.B2" office:value-type="string">
            <text:p text:style-name="P38">OCÉANE VIRGINIE ERICA</text:p>
          </table:table-cell>
        </table:table-row>
        <table:table-row table:style-name="Table1.1">
          <table:table-cell table:style-name="Table1.A1" office:value-type="string">
            <text:p text:style-name="P30">Date de naissance </text:p>
          </table:table-cell>
          <table:table-cell table:style-name="Table1.B3" office:value-type="string">
            <text:p text:style-name="P37">21 AVRIL 1998</text:p>
          </table:table-cell>
        </table:table-row>
      </table:table>
      <text:p text:style-name="P18"/>
      <text:p text:style-name="P22"><draw:custom-shape text:anchor-type="char" draw:z-index="0" draw:name="Rectangle 40" draw:style-name="gr2" draw:text-style-name="P79" svg:width="21.192cm" svg:height="3.529cm" svg:x="-21.191cm" svg:y="0.55cm"><text:p/><draw:enhanced-geometry svg:viewBox="0 0 21600 21600" draw:type="rectangle" draw:enhanced-path="M 0 0 L 21600 0 21600 21600 0 21600 0 0 Z N"/></draw:custom-shape></text:p>
      <text:p text:style-name="P18"/>
      <text:p text:style-name="P31">Copie à rendre</text:p>
      <text:p text:style-name="P32"/>
      <text:p text:style-name="P33">TP – Développeur Web et Web Mobile</text:p>
      <text:p text:style-name="P41"/>
      <text:p text:style-name="P45"/>
      <text:p text:style-name="P18"/>
      <text:p text:style-name="P18"/>
      <text:p text:style-name="P18"/>
      <text:p text:style-name="P18"/>
      <text:p text:style-name="P18"/>
      <text:p text:style-name="P18"/>
      <text:p text:style-name="P18"/>
      <text:p text:style-name="P18"/>
      <text:p text:style-name="P18"/>
      <text:p text:style-name="P77">Documents à compléter et à rendre</text:p>
      <text:p text:style-name="P47"/>
      <text:p text:style-name="P1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46"/>
      <text:p text:style-name="P18"/>
      <text:p text:style-name="P18"/>
      <text:p text:style-name="P18"/>
      <text:p text:style-name="P18"/>
      <text:p text:style-name="P18"/>
      <text:p text:style-name="P18"/>
      <text:p text:style-name="P18"/>
      <text:p text:style-name="P18"/>
      <text:p text:style-name="P18"/>
      <text:p text:style-name="P49"><text:soft-page-break/></text:p>
      <text:p text:style-name="P50"/>
      <text:p text:style-name="P26">Lien du git : https://github.com/Oceduff21/vite-gourmand</text:p>
      <text:p text:style-name="P26"><text:span text:style-name="T3"/></text:p>
      <text:p text:style-name="P26">Lien de l’outil de gestion de projet : </text:p>
      <text:p text:style-name="P26"><text:a xlink:type="simple" xlink:href="https://trello.com/invite/b/699bbc30842ff7943e2ca197/ATTIb8196f37edf8d1cf58dd8c7dada0aad15B0A20DD/tp-developpeur-web-et-web-mobile-vite-gourmand" text:style-name="Internet_20_link" text:visited-style-name="Visited_20_Internet_20_Link">https://trello.com/invite/b/699bbc30842ff7943e2ca197/ATTIb8196f37edf8d1cf58dd8c7dada0aad15B0A20DD/tp-developpeur-web-et-web-mobile-vite-gourmand</text:a></text:p>
      <text:p text:style-name="P26"/>
      <text:p text:style-name="Standard"><text:span text:style-name="T3">Lien du déploiement : </text:span></text:p>
      <text:p text:style-name="Standard"><text:a xlink:type="simple" xlink:href="https://vitegourmand.infinityfree.io/" text:style-name="Internet_20_link" text:visited-style-name="Visited_20_Internet_20_Link">https://vitegourmand.infinityfree.io/</text:a></text:p>
      <text:p text:style-name="P26">Comptes de démonstration (production) :</text:p>
      <text:p text:style-name="P26"><text:span text:style-name="Strong_20_Emphasis">Administrateur</text:span> — login : <text:a xlink:type="simple" xlink:href="mailto:jose@vite-gourmand.fr" text:style-name="Internet_20_link" text:visited-style-name="Visited_20_Internet_20_Link">jose@vite-gourmand.fr</text:a> / mot de passe : Admin123!</text:p>
      <text:p text:style-name="P26"><text:span text:style-name="Strong_20_Emphasis">Employée</text:span> — login : <text:a xlink:type="simple" xlink:href="mailto:julie@vite-gourmand.fr" text:style-name="Internet_20_link" text:visited-style-name="Visited_20_Internet_20_Link">julie@vite-gourmand.fr</text:a> / mot de passe : Employe123! (connexion via /admin/login.php)</text:p>
      <text:p text:style-name="P26"><text:span text:style-name="Strong_20_Emphasis">Client</text:span> — login : <text:a xlink:type="simple" xlink:href="mailto:client@vite-gourmand.fr" text:style-name="Internet_20_link" text:visited-style-name="Visited_20_Internet_20_Link">client@vite-gourmand.fr</text:a> / mot de passe : Client123! (connexion via /login.php)</text:p>
      <text:p text:style-name="P26">Pages clés : accueil, /menus.php (filtres thème/régime/recherche), /menu.php, /login.php, /admin/login.php, /accessibilite.php — https://vitegourmand.infinityfree.io/</text:p>
      <text:p text:style-name="P26"/>
      <text:p text:style-name="P53">SANS CES ELEMENTS, VOTRE COPIE SERA REJETEE</text:p>
      <text:p text:style-name="P54"><draw:frame draw:style-name="fr2" draw:name="Frame1" text:anchor-type="char" svg:x="-0.053cm" svg:y="0.711cm" svg:width="19.817cm" svg:height="1.6cm" draw:z-index="1"><draw:text-box><text:p text:style-name="P48"/></draw:text-box></draw:frame></text:p>
      <text:p text:style-name="P55"/>
      <text:p text:style-name="Standard"><text:span text:style-name="T11">P</text:span><text:span text:style-name="T12">artie 1 : </text:span><text:bookmark-start text:name="_Hlk58936259"/><text:span text:style-name="T12">Analyse des besoins </text:span></text:p>
      <text:p text:style-name="P42"><text:tab/></text:p>
      <text:p text:style-name="P43"/>
      <text:p text:style-name="P43"><text:bookmark-end text:name="_Hlk58936259"/></text:p>
      <text:p text:style-name="Standard"/>
      <text:list xml:id="list1988072464" text:style-name="WW8Num2">
        <text:list-item>
          <text:p text:style-name="P13">Effectuez un résumé du projet en français d’une longueur d’environ 20 lignes soit 200 à 250 mots</text:p>
        </text:list-item>
      </text:list>
      <text:p text:style-name="P15"><text:span text:style-name="T4"/></text:p>
      <text:p text:style-name="P68">Le projet « Vite &amp; Gourmand » consiste à concevoir et réaliser une application web destinée à un traiteur événementiel situé à Bordeaux. Cette entreprise propose différents menus adaptés à des événements variés tels que les mariages, anniversaires, réceptions professionnelles et événements festifs. L’objectif principal du projet est de moderniser la présentation de l’offre et de faciliter la prise de commande pour les clients.</text:p>
      <text:p text:style-name="Text_20_body">Actuellement, la gestion des menus et des demandes repose principalement sur des échanges manuels, ce qui peut entraîner un manque de visibilité, des erreurs de communication et une perte de temps pour le client comme pour le traiteur. L’application web a donc pour but de centraliser les informations, de présenter clairement les menus disponibles et de simplifier le parcours utilisateur.</text:p>
      <text:p text:style-name="Text_20_body">filtrer les offres selon plusieurs critères combinables (recherche textuelle, thème, régime alimentaire, budget, nombre de personnes) avec une recherche intelligente croisant titre, description et métadonnées</text:p>
      <text:p text:style-name="Text_20_body">Le projet prévoit également une interface d’administration destinée au traiteur. Celle-ci permettra la gestion des menus, des informations affichées et le suivi des commandes. L’application devra être responsive afin d’assurer une utilisation optimale sur ordinateur, tablette et smartphone.</text:p>
      <text:p text:style-name="Text_20_body">Enfin, le projet respecte les bonnes pratiques du développement web : accessibilité RGAA (page dédiée accessibilite.php, labels de formulaires, tables structurées, navigation clavier, audit WAVE sur les pages clés — score AIM ~8,8/10), sécurité (CSRF, PDO, bcrypt) et conformité RGPD (politique de confidentialité, cookies, droits utilisateur)</text:p>
      <text:p text:style-name="P68"/>
      <text:p text:style-name="P15"><text:soft-page-break/><text:span text:style-name="T4"/></text:p>
      <text:p text:style-name="P27"/>
      <text:p text:style-name="P27"/>
      <text:p text:style-name="P27"/>
      <text:p text:style-name="P27"/>
      <text:p text:style-name="P27"/>
      <text:p text:style-name="P27"/>
      <text:p text:style-name="P27"/>
      <text:list xml:id="list124953022512609" text:continue-numbering="true" text:style-name="WW8Num2">
        <text:list-item>
          <text:p text:style-name="P14">Exprimez le cahier des charges, l’expression du besoin ou les spécifications fonctionnelles du projet</text:p>
        </text:list-item>
      </text:list>
      <text:p text:style-name="P20"/>
      <text:h text:style-name="P7" text:outline-level="3">Fonctionnalités principales</text:h>
      <text:list xml:id="list4048747789" text:style-name="L1">
        <text:list-item>
          <text:p text:style-name="P62">Consultation de la liste des menus</text:p>
        </text:list-item>
        <text:list-item>
          <text:p text:style-name="P62">Filtrage des menus (type d’événement, budget, nombre de personnes)</text:p>
        </text:list-item>
        <text:list-item>
          <text:p text:style-name="P62">Consultation du détail d’un menu</text:p>
        </text:list-item>
        <text:list-item>
          <text:p text:style-name="P62">Sélection du nombre de personnes</text:p>
        </text:list-item>
        <text:list-item>
          <text:p text:style-name="P62">Commande d’un menu</text:p>
        </text:list-item>
        <text:list-item>
          <text:p text:style-name="P62">Formulaire de contact</text:p>
        </text:list-item>
        <text:list-item>
          <text:p text:style-name="P62">Consultation des avis clients</text:p>
        </text:list-item>
        <text:list-item>
          <text:p text:style-name="P62">Interface d’administration (gestion menus, commandes, avis, utilisateurs ; rôles admin et employé ; dashboard statistiques MySQL en production, MongoDB en local)</text:p>
        </text:list-item>
      </text:list>
      <text:h text:style-name="P6" text:outline-level="3" text:is-list-header="true">Contraintes</text:h>
      <text:list xml:id="list576870134" text:style-name="L2">
        <text:list-item>
          <text:p text:style-name="P63">Application responsive (desktop et mobile)</text:p>
        </text:list-item>
        <text:list-item>
          <text:p text:style-name="P63">Interface claire et accessible (RGAA : labels, contrastes, navigation clavier, page accessibilite.php)</text:p>
        </text:list-item>
        <text:list-item>
          <text:p text:style-name="P63">Sécurité des formulaires</text:p>
        </text:list-item>
        <text:list-item>
          <text:p text:style-name="P63">Respect des règles RGPD</text:p>
        </text:list-item>
        <text:list-item>
          <text:p text:style-name="P63">Navigation simple et intuitiv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1"/>
      <text:p text:style-name="P21"/>
      <text:p text:style-name="P56"><draw:frame draw:style-name="fr2" draw:name="Frame2" text:anchor-type="char" svg:x="-1.429cm" svg:y="-0.54cm" svg:width="22.345cm" svg:height="2.115cm" draw:z-index="2"><draw:text-box><text:p text:style-name="P40"/></draw:text-box></draw:frame><text:span text:style-name="T13">Partie 2: </text:span><text:span text:style-name="T14">Spécifications technique</text:span></text:p>
      <text:p text:style-name="P34"/>
      <text:p text:style-name="P40"/>
      <text:p text:style-name="Standard"/>
      <text:list xml:id="list44912033" text:style-name="WW8Num4">
        <text:list-item>
          <text:p text:style-name="P10"><text:span text:style-name="T4">Spécifiez les technologies que vous avez utilisé en justifiant les conditions d’utilisation et pourquoi le choix de ses éléments </text:span></text:p>
        </text:list-item>
      </text:list>
      <text:list xml:id="list3141321040" text:style-name="L3">
        <text:list-header>
          <text:p text:style-name="P64"><text:span text:style-name="T4">Dans le cadre du projet « Vite &amp; Gourmand », plusieurs technologies et outils ont été utilisés afin de répondre aux besoins fonctionnels et techniques de l’application.</text:span></text:p>
        </text:list-header>
      </text:list>
      <text:p text:style-name="Text_20_body">Le langage <text:span text:style-name="Strong_20_Emphasis">HTML</text:span> a été utilisé pour structurer les pages de l’application et organiser le contenu de manière sémantique. Le <text:span text:style-name="Strong_20_Emphasis">CSS</text:span> a permis de gérer la mise en forme, la charte graphique et le responsive design afin d’assurer une bonne lisibilité sur tous les types d’écrans (desktop et mobile). Le <text:span text:style-name="Strong_20_Emphasis">JavaScript</text:span> a été utilisé pour apporter de l’interactivité, notamment pour la navigation, les boutons, les filtres de menus et la gestion des formulaires.</text:p>
      <text:p text:style-name="Text_20_body">L’outil <text:span text:style-name="Strong_20_Emphasis">Figma</text:span> a été utilisé pour concevoir la charte graphique, les wireframes et les mockups desktop et mobile. Cela a permis de réfléchir en amont à l’expérience utilisateur (UX) et à l’interface graphique (UI) avant la phase de développement.</text:p>
      <text:p text:style-name="Text_20_body">La gestion de versions du projet a été réalisée avec <text:span text:style-name="Strong_20_Emphasis">Git</text:span>, en utilisant la plateforme <text:span text:style-name="Strong_20_Emphasis">GitHub</text:span> pour stocker le code source et suivre l’évolution du projet. Un outil de gestion de projet, <text:span text:style-name="Strong_20_Emphasis">Trello</text:span>, a été utilisé afin d’organiser les tâches, suivre l’avancement et structurer les différentes étapes du projet.</text:p>
      <text:p text:style-name="Text_20_body">Le backend est développé en <text:span text:style-name="Strong_20_Emphasis">PHP 8.3</text:span> avec PDO et sessions. La base relationnelle <text:span text:style-name="Strong_20_Emphasis">MySQL</text:span> (InfinityFree) stocke le catalogue, les commandes et les utilisateurs. <text:span text:style-name="Strong_20_Emphasis">MongoDB</text:span> alimente les statistiques NoSQL en local (XAMPP/Docker) ; le dashboard admin bascule sur MySQL en production. L'application est déployée sur <text:span text:style-name="Strong_20_Emphasis">InfinityFree</text:span> (https://vitegourmand.infinityfree.io/). Le front utilise Bootstrap 5.3, Chart.js, JavaScript (wizard menu, filtres AJAX) et HTML sémantique. Dépôt GitHub : <text:a xlink:type="simple" xlink:href="https://github.com/Oceduff21/vite-gourmand" text:style-name="Internet_20_link" text:visited-style-name="Visited_20_Internet_20_Link">https://github.com/Oceduff21/vite-gourmand</text:a>.</text:p>
      <text:p text:style-name="P15"/>
      <text:list xml:id="list124951913788437" text:continue-list="list44912033" text:style-name="WW8Num4">
        <text:list-item>
          <text:p text:style-name="P10"><text:span text:style-name="T4">Comment avez-vous mis en place votre environnement de travail ? Justifiez vos choix. (README.md)</text:span></text:p>
        </text:list-item>
      </text:list>
      <text:p text:style-name="P68"><text:span text:style-name="T4">Le développement du projet a été réalisé sur un environnement Windows, à l’aide de l’éditeur de code </text:span><text:span text:style-name="Strong_20_Emphasis"><text:span text:style-name="T5">Visual Studio Code</text:span></text:span><text:span text:style-name="T4">. Cet éditeur a été choisi pour sa légèreté, ses nombreuses extensions et sa facilité d’utilisation.</text:span></text:p>
      <text:p text:style-name="Text_20_body">Le développement local repose sur <text:span text:style-name="Strong_20_Emphasis">XAMPP</text:span> (Apache, PHP 8.3, MySQL). L'éditeur Cursor / Visual Studio Code est utilisé avec Git. L'architecture suit une organisation claire : pages PHP (site public et /admin/), dossier /includes/ (db.php, auth.php, helpers.php, a11y-helpers.php), assets CSS/JS et migrations SQL versionnées dans /database/. Le script scripts/fix-php-encoding.ps1 garantit l'encodage UTF-8 des fichiers PHP avant déploiement sur InfinityFree. Le README.md du dépôt documente l'installation.</text:p>
      <text:p text:style-name="Text_20_body">La gestion du code source a été effectuée à l’aide de Git, avec des commits réguliers décrivant les modifications apportées au projet. Cette organisation permet de conserver un historique clair du développement et de revenir sur des versions antérieures si nécessaire.</text:p>
      <text:p text:style-name="P68"><text:span text:style-name="T4"/></text:p>
      <text:p text:style-name="P12"><text:span text:style-name="T4"/></text:p>
      <text:p text:style-name="P27"><text:soft-page-break/></text:p>
      <text:list xml:id="list124952513101970" text:continue-numbering="true" text:style-name="WW8Num4">
        <text:list-item>
          <text:p text:style-name="P10"><text:span text:style-name="T4">Énumérez les mécanismes de sécurité que vous avez mis en place, aussi bien sur vos formulaires que sur les composants front-end ainsi que back-end. <text:s/></text:span></text:p>
        </text:list-item>
      </text:list>
      <text:p text:style-name="P12"><text:span text:style-name="T4"/></text:p>
      <text:h text:style-name="P8" text:outline-level="3"><text:span text:style-name="T4">La sécurité de l’application a été prise en compte dès la phase de conception.</text:span></text:h>
      <text:p text:style-name="Text_20_body">Côté front-end, des contrôles de validation HTML5 et JavaScript sont en place (wizard menu, formulaires inscription/commande). Les messages d'erreur sont explicites et les champs invalides reçoivent le focus clavier. Une page accessibilite.php décrit les mesures RGAA. Les données affichées passent par htmlspecialchars() pour limiter les XSS. Audit WAVE réalisé (juillet 2026) : 0 erreur structurelle sur les pages clés ; quelques alertes de contraste en cours de correction.</text:p>
      <text:p text:style-name="Text_20_body">Côté back-end, la sécurité est implémentée : requêtes préparées PDO (anti-injection SQL), tokens CSRF sur inscription, commande et actions admin, hashage bcrypt (password_hash), gestion des rôles (utilisateur, employé, admin) via auth.php, sessions séparées site public / admin, validation serveur des délais de livraison et règles métier (réduction 10 %, prix livraison, stock menus).</text:p>
      <text:p text:style-name="P39"><text:span text:style-name="T4"/></text:p>
      <text:p text:style-name="P12"><text:span text:style-name="T4"/></text:p>
      <text:p text:style-name="P27"/>
      <text:list xml:id="list124952315213708" text:continue-numbering="true" text:style-name="WW8Num4">
        <text:list-item>
          <text:p text:style-name="P10"><text:span text:style-name="T4">Décrivez une veille technologique que vous avez effectuée, sur les vulnérabilités de sécurité.</text:span></text:p>
        </text:list-item>
      </text:list>
      <text:p text:style-name="P76">Une veille technologique a été réalisée afin de se renseigner sur les bonnes pratiques en matière de sécurité web. Cette veille s’est appuyée sur des ressources reconnues telles que <text:span text:style-name="Strong_20_Emphasis">OWASP</text:span> et <text:span text:style-name="Strong_20_Emphasis">MDN Web Docs</text:span>.</text:p>
      <text:p text:style-name="Text_20_body">Elle a permis d’identifier les principales vulnérabilités rencontrées dans les applications web, comme les attaques XSS, les injections de code ou encore les failles liées à une mauvaise gestion des mots de passe. Ces éléments ont été pris en compte lors de la conception du projet afin de proposer une application plus sécurisée et conforme aux standards actuels du développement web.</text:p>
      <text:p text:style-name="P51"/>
      <text:p text:style-name="P52"><draw:custom-shape text:anchor-type="char" draw:z-index="3" draw:name="Rectangle 4" draw:style-name="gr1" draw:text-style-name="P79" svg:width="18.455cm" svg:height="1.602cm" svg:x="-3.053cm" svg:y="0.651cm"><text:p/><draw:enhanced-geometry svg:viewBox="0 0 21600 21600" draw:type="rectangle" draw:enhanced-path="M 0 0 L 21600 0 21600 21600 0 21600 0 0 Z N"/></draw:custom-shape></text:p>
      <text:p text:style-name="P44"/>
      <text:p text:style-name="Standard"><text:span text:style-name="T14">Partie 3 :</text:span><text:span text:style-name="T15"> </text:span><text:span text:style-name="T14"><text:s/>Recherche</text:span></text:p>
      <text:p text:style-name="P36"/>
      <text:p text:style-name="Standard"/>
      <text:p text:style-name="P18"/>
      <text:list xml:id="list975433312" text:style-name="WW8Num3">
        <text:list-item>
          <text:p text:style-name="P16">Décrivez une situation de travail ayant nécessité une recherche durant le projet à partir de site anglophone. N’oubliez pas de citer la source</text:p>
          <text:p text:style-name="P16"/>
        </text:list-item>
      </text:list>
      <text:p text:style-name="P59">Dans le cadre du projet « Vite &amp; Gourmand », une recherche a été nécessaire afin de comprendre comment sécuriser les formulaires d’une application web. En effet, l’application permet aux utilisateurs de saisir différentes informations personnelles, notamment via un formulaire de contact et lors de la commande d’un menu.</text:p>
      <text:p text:style-name="Text_20_body">Il était donc indispensable de s’assurer que les données saisies par les utilisateurs soient correctement traitées et protégées contre les attaques courantes. La problématique principale portait sur la prévention des attaques de type Cross-Site Scripting (XSS), qui consistent à injecter du code malveillant dans les champs de saisie d’un site web.</text:p>
      <text:p text:style-name="Text_20_body">Cette recherche avait pour objectif de comprendre les risques liés à ce type d’attaque, d’identifier les bonnes pratiques à mettre en place et de savoir comment les éviter lors du développement d’une application web. Elle a permis de mieux appréhender les enjeux de sécurité côté front-end et de renforcer la fiabilité globale du projet.</text:p>
      <text:p text:style-name="P15"/>
      <text:p text:style-name="P27"/>
      <text:list xml:id="list124952467012853" text:continue-numbering="true" text:style-name="WW8Num3">
        <text:list-item>
          <text:p text:style-name="P11"><text:span text:style-name="T4">Mentionnez l’extrait du site anglophone qui vous a aidé dans la question précédente en effectuant une traduction en français.</text:span></text:p>
        </text:list-item>
      </text:list>
      <text:h text:style-name="P9" text:outline-level="3"><text:span text:style-name="Strong_20_Emphasis"><text:span text:style-name="T5">Source : MDN Web Docs</text:span></text:span></text:h>
      <text:p text:style-name="Text_20_body"><text:span text:style-name="Strong_20_Emphasis">Texteoriginal(enanglais) :</text:span><text:line-break/>“Cross-site scripting (XSS) attacks are a type of injection, in which malicious scripts are injected into otherwise benign and trusted websites. XSS attacks occur when an attacker uses a web application to send malicious code, generally in the form of a browser side script, to a different end user.”</text:p>
      <text:p text:style-name="Text_20_body"><text:span text:style-name="Strong_20_Emphasis">Traductionenfrançais :</text:span><text:line-break/>Les attaques de type Cross-Site Scripting (XSS) sont une forme d’injection dans laquelle des scripts malveillants sont injectés dans des sites web pourtant fiables et légitimes. Ces attaques se produisent lorsqu’un attaquant utilise une application web pour envoyer du code malveillant, généralement sous la forme d’un script exécuté par le navigateur, à un autre utilisateur final.</text:p>
      <text:p text:style-name="P69"><text:span text:style-name="Strong_20_Emphasis"><text:span text:style-name="T5"/></text:span></text:p>
      <text:p text:style-name="P69"><text:span text:style-name="Strong_20_Emphasis"><text:span text:style-name="T5"/></text:span></text:p>
      <text:p text:style-name="P69"><text:span text:style-name="Strong_20_Emphasis"><text:span text:style-name="T5"/></text:span></text:p>
      <text:p text:style-name="P12"><text:span text:style-name="T4"/></text:p>
      <text:p text:style-name="P17"/>
      <text:p text:style-name="P15"/>
      <text:p text:style-name="P23"><draw:frame draw:style-name="fr1" draw:name="Frame3" text:anchor-type="char" svg:x="-3.351cm" svg:y="0.076cm" svg:width="18.454cm" svg:height="1.602cm" draw:z-index="4"><draw:text-box><text:p text:style-name="P35"><text:s text:c="23"/></text:p><text:p text:style-name="P57"><text:span text:style-name="T14"><text:s text:c="23"/>Partie 4 :</text:span><text:span text:style-name="T15"> </text:span><text:span text:style-name="T14"><text:s/>Informations complémentaire</text:span></text:p><text:p text:style-name="P35"/><text:p text:style-name="P24"/><text:p text:style-name="P24"/><text:p text:style-name="P25"/></draw:text-box></draw:frame><text:soft-page-break/></text:p>
      <text:p text:style-name="P19"/>
      <text:p text:style-name="P18"/>
      <text:p text:style-name="P18"/>
      <text:p text:style-name="P18"/>
      <text:p text:style-name="P18"/>
      <text:list xml:id="list2583058249" text:style-name="WW8Num1">
        <text:list-item>
          <text:p text:style-name="P28">Autres ressources</text:p>
        </text:list-item>
      </text:list>
      <text:p text:style-name="P29"/>
      <text:p text:style-name="P60">Dans le cadre de la réalisation du projet « Vite &amp; Gourmand », plusieurs outils et ressources ont été utilisés afin de mener à bien les différentes étapes du projet.</text:p>
      <text:p text:style-name="Text_20_body">L’outil <text:span text:style-name="Strong_20_Emphasis">Figma</text:span> a été utilisé pour concevoir la charte graphique, les wireframes et les mockups desktop et mobile. Il a permis de travailler sur l’expérience utilisateur et l’interface graphique avant la phase de développement.</text:p>
      <text:p text:style-name="Text_20_body">Les diagrammes UML ont été réalisés à l’aide de <text:span text:style-name="Strong_20_Emphasis">Draw.io</text:span>, facilitant la modélisation des cas d’utilisation, des séquences et du diagramme de classes.<text:line-break/><text:span text:style-name="Strong_20_Emphasis">Trello</text:span> a été utilisé comme outil de gestion de projet afin d’organiser les tâches, suivre l’avancement et planifier les différentes phases du projet.<text:line-break/>La gestion de versions a été assurée avec <text:span text:style-name="Strong_20_Emphasis">Git</text:span> et la plateforme <text:span text:style-name="Strong_20_Emphasis">GitHub</text:span>, permettant de conserver un historique du travail et de centraliser le code source.</text:p>
      <text:p text:style-name="Text_20_body">Les livrables PDF joints au dossier sont : Manuel utilisateur (docs/MANUEL_UTILISATEUR.pdf), Charte graphique (docs/CHARTE_GRAPHIQUE.pdf) et Documentation technique (docs/DOCUMENTATION_TECHNIQUE.pdf). Des ressources en ligne telles que MDN Web Docs</text:p>
      <text:p text:style-name="P60"/>
      <text:list xml:id="list124953060314351" text:continue-numbering="true" text:style-name="WW8Num1">
        <text:list-item>
          <text:p text:style-name="P28">Informations complémentaires</text:p>
        </text:list-item>
      </text:list>
      <text:p text:style-name="P29"/>
      <text:p text:style-name="P60">Les principales difficultés rencontrées ont concerné le déploiement sur hébergement mutualisé (InfinityFree) : encodage UTF-8 obligatoire des fichiers PHP, limites de taille en upload, absence de MongoDB en production (fallback MySQL). L'adaptation responsive et l'accessibilité RGAA ont également demandé plusieurs itérations (audit WAVE, corrections de contrastes et structure HTML).</text:p>
      <text:p text:style-name="Text_20_body">La structuration du parcours utilisateur et la hiérarchisation des informations ont également nécessité plusieurs ajustements afin de proposer une expérience claire et intuitive.</text:p>
      <text:p text:style-name="P29"/>
      <text:p text:style-name="P18"/>
      <text:h text:style-name="P4" text:outline-level="2">3 Améliorations possibles</text:h>
      <text:p text:style-name="P58"><text:span text:style-name="T5"/></text:p>
      <text:p text:style-name="Text_20_body">Plusieurs améliorations pourraient être envisagées : intégration d'un <text:span text:style-name="Strong_20_Emphasis">paiement en ligne sécurisé</text:span> (Stripe/PayPal), développement d'une <text:span text:style-name="Strong_20_Emphasis">PWA</text:span> ou application mobile native pour les clients réguliers, et synchronisation calendrier (Google Calendar) pour la disponibilité du traiteur.</text:p>
      <text:p text:style-name="Text_20_body">D'autres pistes : module de <text:span text:style-name="Strong_20_Emphasis">facturation B2B</text:span> automatisée pour les séminaires entreprise, export comptable des commandes, et audit RGAA complet avec tests utilisateurs en situation réelle.</text:p>
      <text:p text:style-name="Text_20_body"/>
      <text:p text:style-name="Text_20_body"/>
      <text:p text:style-name="Text_20_body"><text:soft-page-break/></text:p>
      <text:h text:style-name="P5" text:outline-level="2">4 Compétences acquises</text:h>
      <text:p text:style-name="Text_20_body"/>
      <text:p text:style-name="Text_20_body">La réalisation de ce projet m’a permis de renforcer mes compétences en analyse des besoins, en conception UX/UI et en organisation de projet. J’ai également consolidé mes connaissances en développement web, en gestion de versions avec Git et en utilisation d’outils professionnels tels que Figma et Trello.</text:p>
      <text:p text:style-name="Text_20_body">Ce projet m'a permis de mieux comprendre les enjeux liés à la sécurité, à l'accessibilité numérique (RGAA/WAVE), au déploiement PHP/MySQL et à la conception d'une application web répondant à des besoins concrets d'un traiteur événementiel.</text:p>
      <text:p text:style-name="Text_20_body"/>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style:shadow="none" fo:keep-with-next="always"/>
      <style:text-properties fo:color="#00b050" loext:opacity="10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loext:opacity="100%" style:font-name="Cabrito Sans Cond Demi" fo:font-family="'Cabrito Sans Cond Demi', 'Times New Roman'" style:font-family-generic="modern" style:font-pitch="variable" fo:font-size="20pt" fo:font-weight="bold" style:font-size-asian="20pt" style:font-weight-asian="bold" style:font-name-complex="Cabrito Sans Cond Demi" style:font-family-complex="'Cabrito Sans Cond Demi', 'Times New Roman'" style:font-family-generic-complex="modern" style:font-pitch-complex="variable"/>
    </style:style>
    <style:style style:name="titre2_5f_comnicia" style:display-name="titre2_comnicia" style:family="paragraph" style:parent-style-name="Standard">
      <style:paragraph-properties fo:text-align="center" style:justify-single-word="false"/>
      <style:text-properties fo:color="#595959" loext:opacity="100%" style:font-name="Cabrito Sans Ext Regular" fo:font-family="'Cabrito Sans Ext Regular', Calibri" style:font-family-generic="modern" style:font-pitch="variable" fo:font-size="18pt" fo:font-weight="bold" style:font-size-asian="18pt" style:font-weight-asian="bold" style:font-name-complex="Cabrito Sans Ext Regular" style:font-family-complex="'Cabrito Sans Ext Regular', Calibri" style:font-family-generic-complex="moder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plex="Calibri" style:font-family-complex="Calibri"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loext:opacity="10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loext:opacity="100%"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loext:opacity="10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loext:opacity="100%"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loext:opacity="100%" fo:background-color="#e1dfdd"/>
    </style:style>
    <style:style style:name="titre1_5f_comnicia_20_Car" style:display-name="titre1_comnicia Car" style:family="text">
      <style:text-properties fo:color="#8d1818" loext:opacity="100%" style:font-name="Cabrito Sans Cond Demi" fo:font-family="'Cabrito Sans Cond Demi', 'Times New Roman'" style:font-family-generic="modern" style:font-pitch="variable" fo:font-size="20pt" fo:font-weight="bold" style:font-size-asian="20pt" style:font-weight-asian="bold" style:font-name-complex="Cabrito Sans Cond Demi" style:font-family-complex="'Cabrito Sans Cond Demi', 'Times New Roman'" style:font-family-generic-complex="modern" style:font-pitch-complex="variable"/>
    </style:style>
    <style:style style:name="titre2_5f_comnicia_20_Car" style:display-name="titre2_comnicia Car" style:family="text">
      <style:text-properties fo:color="#595959" loext:opacity="100%" style:font-name="Cabrito Sans Ext Regular" fo:font-family="'Cabrito Sans Ext Regular', Calibri" style:font-family-generic="modern" style:font-pitch="variable" fo:font-size="18pt" fo:font-weight="bold" style:font-size-asian="18pt" style:font-weight-asian="bold" style:font-name-complex="Cabrito Sans Ext Regular" style:font-family-complex="'Cabrito Sans Ext Regular', Calibri" style:font-family-generic-complex="modern" style:font-pitch-complex="variable"/>
    </style:style>
    <style:style style:name="_5f_xbe" style:display-name="_xbe"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3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3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3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3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4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4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4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4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000000" loext:opacity="1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bottom="0.702cm" style:dynamic-spacing="true"/>
      </style:header-style>
      <style:footer-style>
        <style:header-footer-properties fo:min-height="0.771cm" fo:margin-top="0.672cm" style:dynamic-spacing="true"/>
      </style:footer-style>
    </style:page-layout>
  </office:automatic-styles>
  <office:master-styles>
    <style:master-page style:name="Standard" style:page-layout-name="Mpm1">
      <style:header>
        <text:p text:style-name="MP1"><draw:frame draw:style-name="Mfr1" draw:name="image9.png" text:anchor-type="char" svg:x="-1.007cm" svg:y="-0.714cm" svg:width="3.3cm" svg:height="1.235cm" draw:z-index="12"><draw:image xlink:href="Pictures/10000001000000CE0000004E2CF5DB4B4598BFF0.png" xlink:type="simple" xlink:show="embed" xlink:actuate="onLoad" draw:mime-type="image/png"/></draw:frame><text:tab/></text:p>
        <text:p text:style-name="Header"/>
      </style:header>
      <style:footer>
        <text:p text:style-name="Standard"><text:span text:style-name="MT1">©Studi - Reproduction interdite <text:tab/><text:tab/><text:tab/><text:tab/><text:tab/> <text:s text:c="29"/>Page </text:span><text:span text:style-name="MT1"><text:page-number text:select-page="current">8</text:page-number></text:span><text:span text:style-name="MT1"><text:s/>sur </text:span><text:span text:style-name="MT1"><text:page-count style:num-format="1">8</text:page-count></text:span></text:p>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Anne Champeaux</meta:initial-creator>
    <meta:creation-date>2025-08-04T10:50:00</meta:creation-date>
    <dc:date>2026-03-06T12:49:51.204000000</dc:date>
    <meta:print-date>2021-11-18T08:45:00</meta:print-date>
    <meta:editing-cycles>6</meta:editing-cycles>
    <meta:generator>LibreOffice/7.2.4.1$Windows_X86_64 LibreOffice_project/27d75539669ac387bb498e35313b970b7fe9c4f9</meta:generator>
    <meta:editing-duration>P11DT9H53M17S</meta:editing-duration>
    <meta:document-statistic meta:table-count="1" meta:image-count="1" meta:object-count="0" meta:page-count="8" meta:paragraph-count="84" meta:word-count="1780" meta:character-count="11867" meta:non-whitespace-character-count="10099"/>
    <meta:user-defined meta:name="NXTAG2">000800680a0000000000010282210207f7000400038000</meta:user-defined>
  </office:meta>
</office:document-meta>
</file>